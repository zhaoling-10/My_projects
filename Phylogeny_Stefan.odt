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261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261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ec9ecbd-7fff-c8c7-28d8-cb3ccc40d2e1"/>2.7. Phylogeny</text:p>
      <text:p text:style-name="P1">A phylogenetic tree was then generated for all available high- quality (over 80% complete single-copy BUSCO genes) pinniped assemblies from NCBI.  To do so, fasta files were obtained a supermatrix alignment for the busco genes using BUSCO_phylogenomics (https://github.com/jamiemcg/BUSCO_ phylogenomics) with default settings. Next, a phylogenetic tree was reconstructed using iqtree v2.3.4 (Minh et al., 2020) utilising the JTT+F+I+R10 substitution model (chosen according to BIC) and ultrafast bootstrapping (1000) and an SH-like approximate likelihood ratio test (1000). Lastly, the phylogenetic tree was visualized using TreeViewer 2.2.0 (Bianchini &amp; Sánchez-Baracaldo, 2024)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1:36:21.325170118</meta:creation-date>
    <dc:date>2026-05-11T11:44:38.775833718</dc:date>
    <meta:editing-duration>PT8M18S</meta:editing-duration>
    <meta:editing-cycles>1</meta:editing-cycles>
    <meta:document-statistic meta:table-count="0" meta:image-count="0" meta:object-count="0" meta:page-count="1" meta:paragraph-count="3" meta:word-count="91" meta:character-count="695" meta:non-whitespace-character-count="604"/>
    <meta:generator>LibreOffice/24.2.7.2$Linux_X86_64 LibreOffice_project/420$Build-2</meta:generator>
  </office:meta>
</office:document-meta>
</file>